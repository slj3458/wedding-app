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Title">
      <style:text-properties style:font-name="Noto Sans" officeooo:rsid="000b963c" officeooo:paragraph-rsid="000b963c"/>
    </style:style>
    <style:style style:name="P2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3035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1063in" style:type="right" style:leader-style="dotted" style:leader-text="."/>
        </style:tab-stops>
      </style:paragraph-properties>
    </style:style>
    <style:style style:name="P5" style:family="paragraph" style:parent-style-name="Heading_20_1" style:list-style-name=""/>
    <style:style style:name="P6" style:family="paragraph" style:parent-style-name="Text_20_body" style:list-style-name=""/>
    <style:style style:name="P7" style:family="paragraph" style:parent-style-name="Heading_20_1">
      <style:paragraph-properties fo:break-before="page"/>
    </style:style>
    <style:style style:name="P8" style:family="paragraph" style:parent-style-name="Text_20_body">
      <style:text-properties style:font-name="Noto Sans" officeooo:rsid="000b963c" officeooo:paragraph-rsid="000b963c" fo:background-color="transparent"/>
    </style:style>
    <style:style style:name="P9" style:family="paragraph" style:parent-style-name="Text_20_body">
      <style:text-properties style:font-name="Noto Sans" officeooo:rsid="000b963c" officeooo:paragraph-rsid="000b963c"/>
    </style:style>
    <style:style style:name="P10" style:family="paragraph" style:parent-style-name="Text_20_body">
      <style:text-properties style:font-name="monospace" officeooo:rsid="000b963c" officeooo:paragraph-rsid="000b963c"/>
    </style:style>
    <style:style style:name="P11" style:family="paragraph" style:parent-style-name="Heading_20_1">
      <style:text-properties style:text-line-through-style="solid" style:text-line-through-type="single" fo:background-color="#ffff00"/>
    </style:style>
    <style:style style:name="P12" style:family="paragraph" style:parent-style-name="Text_20_body">
      <style:text-properties style:text-line-through-style="solid" style:text-line-through-type="single" style:font-name="Noto Sans" officeooo:rsid="000b963c" officeooo:paragraph-rsid="000b963c" fo:background-color="#ffff00"/>
    </style:style>
    <style:style style:name="P13" style:family="paragraph" style:parent-style-name="Text_20_body">
      <style:text-properties style:font-name="Noto Sans" fo:font-weight="bold" officeooo:rsid="000b963c" officeooo:paragraph-rsid="000b963c" style:font-weight-asian="bold" style:font-weight-complex="bold"/>
    </style:style>
    <style:style style:name="P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0b963c"/>
    </style:style>
    <style:style style:name="T2" style:family="text">
      <style:text-properties fo:color="#54ff54" loext:opacity="100%" fo:font-weight="bold" fo:background-color="#ffffff" loext:char-shading-value="0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fo:color="#5454ff" loext:opacity="100%" fo:font-weight="bold" fo:background-color="#ffffff" loext:char-shading-value="0"/>
    </style:style>
    <style:style style:name="T5" style:family="text">
      <style:text-properties fo:color="#5454ff" loext:opacity="100%" fo:font-weight="bold" fo:background-color="#81d41a" loext:char-shading-value="0"/>
    </style:style>
    <style:style style:name="T6" style:family="text">
      <style:text-properties style:font-name="Noto Sans" fo:font-weight="bold" style:font-weight-asian="bold" style:font-weight-complex="bold"/>
    </style:style>
    <style:style style:name="T7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dding App Development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1478_3123326751" text:style-name="Index_20_Link" text:visited-style-name="Index_20_Link">Local Development<text:tab/>2</text:a></text:p>
          <text:p text:style-name="P2"><text:a xlink:type="simple" xlink:href="#__RefHeading___Toc1480_3123326751" text:style-name="Index_20_Link" text:visited-style-name="Index_20_Link">Development Commands<text:tab/>2</text:a></text:p>
          <text:p text:style-name="P3"><text:a xlink:type="simple" xlink:href="#__RefHeading___Toc1482_3123326751" text:style-name="Index_20_Link" text:visited-style-name="Index_20_Link">Frontend<text:tab/>2</text:a></text:p>
          <text:p text:style-name="P3"><text:a xlink:type="simple" xlink:href="#__RefHeading___Toc1484_3123326751" text:style-name="Index_20_Link" text:visited-style-name="Index_20_Link">Backend<text:tab/>2</text:a></text:p>
          <text:p text:style-name="P2"><text:a xlink:type="simple" xlink:href="#__RefHeading___Toc1486_3123326751" text:style-name="Index_20_Link" text:visited-style-name="Index_20_Link">Production Commands<text:tab/>2</text:a></text:p>
          <text:p text:style-name="P2"><text:a xlink:type="simple" xlink:href="#__RefHeading___Toc1488_3123326751" text:style-name="Index_20_Link" text:visited-style-name="Index_20_Link">Application Settings<text:tab/>2</text:a></text:p>
          <text:p text:style-name="P3"><text:a xlink:type="simple" xlink:href="#__RefHeading___Toc1490_3123326751" text:style-name="Index_20_Link" text:visited-style-name="Index_20_Link">Color Palette<text:tab/>2</text:a></text:p>
          <text:p text:style-name="P2"><text:a xlink:type="simple" xlink:href="#__RefHeading___Toc1492_3123326751" text:style-name="Index_20_Link" text:visited-style-name="Index_20_Link">GitHub<text:tab/>3</text:a></text:p>
          <text:p text:style-name="P3"><text:a xlink:type="simple" xlink:href="#__RefHeading___Toc1494_3123326751" text:style-name="Index_20_Link" text:visited-style-name="Index_20_Link">Repository Address<text:tab/>3</text:a></text:p>
          <text:p text:style-name="P3"><text:a xlink:type="simple" xlink:href="#__RefHeading___Toc1496_3123326751" text:style-name="Index_20_Link" text:visited-style-name="Index_20_Link">Personal access token<text:tab/>3</text:a></text:p>
          <text:p text:style-name="P3"><text:a xlink:type="simple" xlink:href="#__RefHeading___Toc1498_3123326751" text:style-name="Index_20_Link" text:visited-style-name="Index_20_Link">Git Workflow<text:tab/>3</text:a></text:p>
          <text:p text:style-name="P3"><text:a xlink:type="simple" xlink:href="#__RefHeading___Toc1500_3123326751" text:style-name="Index_20_Link" text:visited-style-name="Index_20_Link">Git Quick Reference Commands<text:tab/>3</text:a></text:p>
          <text:p text:style-name="P4"><text:a xlink:type="simple" xlink:href="#__RefHeading___Toc1502_3123326751" text:style-name="Index_20_Link" text:visited-style-name="Index_20_Link"># See current changes<text:tab/>3</text:a></text:p>
          <text:p text:style-name="P4"><text:a xlink:type="simple" xlink:href="#__RefHeading___Toc1504_3123326751" text:style-name="Index_20_Link" text:visited-style-name="Index_20_Link"># Add all changes<text:tab/>3</text:a></text:p>
          <text:p text:style-name="P4"><text:a xlink:type="simple" xlink:href="#__RefHeading___Toc1506_3123326751" text:style-name="Index_20_Link" text:visited-style-name="Index_20_Link"># Commit changes<text:tab/>3</text:a></text:p>
          <text:p text:style-name="P4"><text:a xlink:type="simple" xlink:href="#__RefHeading___Toc1508_3123326751" text:style-name="Index_20_Link" text:visited-style-name="Index_20_Link"># Push to GitHub<text:tab/>4</text:a></text:p>
          <text:p text:style-name="P4"><text:a xlink:type="simple" xlink:href="#__RefHeading___Toc1510_3123326751" text:style-name="Index_20_Link" text:visited-style-name="Index_20_Link"># Pull latest from GitHub (if working from multiple computers)<text:tab/>4</text:a></text:p>
        </text:index-body>
      </text:table-of-content>
      <text:h text:style-name="P5" text:outline-level="1"/>
      <text:h text:style-name="P6" text:outline-level="1"/>
      <text:h text:style-name="P6" text:outline-level="1"/>
      <text:h text:style-name="P6" text:outline-level="1"/>
      <text:h text:style-name="P7" text:outline-level="1"><text:bookmark-start text:name="__RefHeading___Toc1478_3123326751"/>Local Development<text:bookmark-end text:name="__RefHeading___Toc1478_3123326751"/></text:h>
      <text:p text:style-name="P8">/home/scott/wedding-app</text:p>
      <text:h text:style-name="Heading_20_1" text:outline-level="1"><text:bookmark-start text:name="__RefHeading___Toc1480_3123326751"/><text:span text:style-name="T1">Development </text:span>Commands<text:bookmark-end text:name="__RefHeading___Toc1480_3123326751"/></text:h>
      <text:h text:style-name="Heading_20_2" text:outline-level="2"><text:bookmark-start text:name="__RefHeading___Toc1482_3123326751"/>Frontend<text:bookmark-end text:name="__RefHeading___Toc1482_3123326751"/></text:h>
      <text:p text:style-name="P9">bash# Start frontend (development) server</text:p>
      <text:p text:style-name="P10"><text:span text:style-name="T2">scott@hpg4</text:span><text:span text:style-name="T3">:</text:span><text:span text:style-name="T4">~/wedding-app/</text:span><text:span text:style-name="T5">frontend</text:span><text:span text:style-name="T3">$</text:span><text:span text:style-name="T6">npm run dev</text:span></text:p>
      <text:h text:style-name="Heading_20_2" text:outline-level="2"><text:bookmark-start text:name="__RefHeading___Toc1484_3123326751"/>Backend<text:bookmark-end text:name="__RefHeading___Toc1484_3123326751"/></text:h>
      <text:p text:style-name="P9">bash# Start backend</text:p>
      <text:p text:style-name="P10"><text:span text:style-name="T2">scott@hpg4</text:span><text:span text:style-name="T3">:</text:span><text:span text:style-name="T4">~/wedding-app</text:span><text:span text:style-name="T3">$ </text:span><text:span text:style-name="T7">uv run fastapi dev app/main.py</text:span><text:line-break/></text:p>
      <text:h text:style-name="P11" text:outline-level="1"><text:bookmark-start text:name="__RefHeading___Toc1486_3123326751"/>Production Commands<text:bookmark-end text:name="__RefHeading___Toc1486_3123326751"/></text:h>
      <text:p text:style-name="P12"># Build for production</text:p>
      <text:p text:style-name="P12"><text:tab/><text:span text:style-name="T8">npm run build</text:span></text:p>
      <text:p text:style-name="P12"># Preview production build</text:p>
      <text:p text:style-name="P12"><text:tab/><text:span text:style-name="T8">npm run preview</text:span></text:p>
      <text:p text:style-name="P9"><text:tab/></text:p>
      <text:h text:style-name="Heading_20_1" text:outline-level="1"><text:bookmark-start text:name="__RefHeading___Toc1488_3123326751"/>Application Settings<text:tab/><text:bookmark-end text:name="__RefHeading___Toc1488_3123326751"/></text:h>
      <text:p text:style-name="P9">Admin Password: wedding2026</text:p>
      <text:h text:style-name="Heading_20_2" text:outline-level="2"><text:bookmark-start text:name="__RefHeading___Toc1490_3123326751"/>Color Palette<text:bookmark-end text:name="__RefHeading___Toc1490_3123326751"/></text:h>
      <text:p text:style-name="P9">Jewel tone </text:p>
      <text:p text:style-name="P9">deep purple<text:tab/>#67074e<text:tab/>(103,7,78)</text:p>
      <text:h text:style-name="Heading_20_1" text:outline-level="1"><text:bookmark-start text:name="__RefHeading___Toc1492_3123326751"/><text:soft-page-break/>GitHub<text:bookmark-end text:name="__RefHeading___Toc1492_3123326751"/></text:h>
      <text:h text:style-name="Heading_20_2" text:outline-level="2"><text:bookmark-start text:name="__RefHeading___Toc1494_3123326751"/>Repository Address<text:bookmark-end text:name="__RefHeading___Toc1494_3123326751"/></text:h>
      <text:p text:style-name="P9">github/slj3458/wedding-app</text:p>
      <text:h text:style-name="Heading_20_2" text:outline-level="2"><text:bookmark-start text:name="__RefHeading___Toc1496_3123326751"/>Personal access token<text:bookmark-end text:name="__RefHeading___Toc1496_3123326751"/></text:h>
      <text:p text:style-name="P9">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</text:p>
      <text:h text:style-name="Heading_20_2" text:outline-level="2"><text:bookmark-start text:name="__RefHeading___Toc1498_3123326751"/>Git Workflow<text:bookmark-end text:name="__RefHeading___Toc1498_3123326751"/></text:h>
      <text:p text:style-name="P9">Whenever changes are made:</text:p>
      <text:p text:style-name="P9">cd ~/wedding-app</text:p>
      <text:p text:style-name="P9"># Check what files changed</text:p>
      <text:p text:style-name="P13"><text:tab/>git status</text:p>
      <text:p text:style-name="P9"># Add all changes</text:p>
      <text:p text:style-name="P13"><text:tab/>git add .</text:p>
      <text:p text:style-name="P9"># Commit with a message</text:p>
      <text:p text:style-name="P9"><text:span text:style-name="T8"><text:tab/>git commit -m</text:span> "<office:annotation office:name="__Annotation__1365_3123326751" loext:resolved="false"><dc:creator>Unknown Author</dc:creator><dc:date>2026-01-14T08:44:09.063227064</dc:date><text:p text:style-name="P14"><text:span text:style-name="T9">Description of changes or updates</text:span></text:p></office:annotation>Add navigation bar and section switching<office:annotation-end office:name="__Annotation__1365_3123326751"/>"</text:p>
      <text:p text:style-name="P9"># Push to GitHub</text:p>
      <text:p text:style-name="P13"><text:tab/>git push</text:p>
      <text:h text:style-name="Heading_20_2" text:outline-level="2"><text:bookmark-start text:name="__RefHeading___Toc1500_3123326751"/>Git Quick Reference Commands<text:bookmark-end text:name="__RefHeading___Toc1500_3123326751"/></text:h>
      <text:h text:style-name="Heading_20_3" text:outline-level="3"><text:bookmark-start text:name="__RefHeading___Toc1502_3123326751"/># See current changes<text:bookmark-end text:name="__RefHeading___Toc1502_3123326751"/></text:h>
      <text:p text:style-name="P13"><text:tab/>git status</text:p>
      <text:h text:style-name="Heading_20_3" text:outline-level="3"><text:bookmark-start text:name="__RefHeading___Toc1504_3123326751"/># Add all changes<text:bookmark-end text:name="__RefHeading___Toc1504_3123326751"/></text:h>
      <text:p text:style-name="P13"><text:tab/>git add .</text:p>
      <text:h text:style-name="Heading_20_3" text:outline-level="3"><text:bookmark-start text:name="__RefHeading___Toc1506_3123326751"/># Commit changes<text:bookmark-end text:name="__RefHeading___Toc1506_3123326751"/></text:h>
      <text:p text:style-name="P13"><text:tab/>git commit -m "<text:span text:style-name="T10">Your message here</text:span>"</text:p>
      <text:h text:style-name="Heading_20_3" text:outline-level="3"><text:bookmark-start text:name="__RefHeading___Toc1508_3123326751"/><text:soft-page-break/># Push to GitHub<text:bookmark-end text:name="__RefHeading___Toc1508_3123326751"/></text:h>
      <text:p text:style-name="P13"><text:tab/>git push</text:p>
      <text:h text:style-name="Heading_20_3" text:outline-level="3"><text:bookmark-start text:name="__RefHeading___Toc1510_3123326751"/># Pull latest from GitHub (if working from multiple computers)<text:bookmark-end text:name="__RefHeading___Toc1510_3123326751"/></text:h>
      <text:p text:style-name="P13"><text:tab/>git pul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106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4T08:32:42.808559989</meta:creation-date>
    <dc:title>General</dc:title>
    <meta:editing-duration>P2DT7H28M28S</meta:editing-duration>
    <meta:editing-cycles>5</meta:editing-cycles>
    <meta:generator>LibreOffice/25.2.3.2$Linux_X86_64 LibreOffice_project/520$Build-2</meta:generator>
    <dc:date>2026-02-15T12:13:29.818161949</dc:date>
    <meta:document-statistic meta:table-count="0" meta:image-count="0" meta:object-count="0" meta:page-count="4" meta:paragraph-count="66" meta:word-count="219" meta:character-count="1399" meta:non-whitespace-character-count="1230"/>
    <meta:template xlink:type="simple" xlink:actuate="onRequest" xlink:title="General" xlink:href="../../.config/libreoffice/4/user/template/General1.ott" meta:date="2026-01-14T08:32:42.379179413"/>
  </office:meta>
</office:document-meta>
</file>